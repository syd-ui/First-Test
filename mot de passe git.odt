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tuTXo0R2zgbPOwKl8hWYSy6t9PB2991gwDPz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01:48:12.001337413</meta:creation-date>
    <dc:date>2026-01-10T01:48:46.531543827</dc:date>
    <meta:editing-duration>PT36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24.2.7.2$Linux_X86_64 LibreOffice_project/420$Build-2</meta:generator>
  </office:meta>
</office:document-meta>
</file>